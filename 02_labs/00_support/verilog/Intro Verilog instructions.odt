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Create Project</text:p>
          <text:list>
            <text:list-item>
              <text:p text:style-name="P1">chip: xc7a35tcpg236-1</text:p>
            </text:list-item>
          </text:list>
        </text:list-item>
        <text:list-item>
          <text:p text:style-name="P1">Create design file</text:p>
          <text:list>
            <text:list-item>
              <text:p text:style-name="P1">rt clk to set as top</text:p>
            </text:list-item>
          </text:list>
        </text:list-item>
        <text:list-item>
          <text:p text:style-name="P1">Synthesize &amp; fix any errors</text:p>
        </text:list-item>
        <text:list-item>
          <text:p text:style-name="P1">Create sim file</text:p>
          <text:list>
            <text:list-item>
              <text:p text:style-name="P1">Use template on Polylearn</text:p>
            </text:list-item>
            <text:list-item>
              <text:p text:style-name="P1">modify for your circuit</text:p>
            </text:list-item>
            <text:list-item>
              <text:p text:style-name="P1">list all test cases</text:p>
            </text:list-item>
          </text:list>
        </text:list-item>
        <text:list-item>
          <text:p text:style-name="P1">Simulate - check timing diagram</text:p>
        </text:list-item>
        <text:list-item>
          <text:p text:style-name="P1">Add constraints file &amp; modify</text:p>
        </text:list-item>
        <text:list-item>
          <text:p text:style-name="P1">Implement &amp; generate bit stream</text:p>
        </text:list-item>
        <text:list-item>
          <text:p text:style-name="P1">Program board &amp; tes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pellorhead</meta:initial-creator>
    <dc:creator>Propellorhead</dc:creator>
    <meta:editing-cycles>3</meta:editing-cycles>
    <meta:creation-date>2018-09-27T05:22:00</meta:creation-date>
    <dc:date>2018-09-27T05:27:00</dc:date>
    <meta:editing-duration>PT5M</meta:editing-duration>
    <meta:generator>LibreOffice/24.2.7.2$Linux_X86_64 LibreOffice_project/420$Build-2</meta:generator>
    <meta:document-statistic meta:table-count="0" meta:image-count="0" meta:object-count="0" meta:page-count="1" meta:paragraph-count="13" meta:word-count="65" meta:character-count="319" meta:non-whitespace-character-count="280"/>
    <meta:user-defined meta:name="AppVersion">12.0000</meta:user-defined>
    <meta:template xlink:type="simple" xlink:actuate="onRequest" xlink:title="Normal" xlink:href=""/>
  </office:meta>
</office:document-meta>
</file>